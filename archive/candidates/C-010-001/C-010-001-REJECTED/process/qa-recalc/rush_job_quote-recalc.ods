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8c3b28" style:diagonal-bl-tr="none" style:diagonal-tl-br="none" fo:border-left="1.76pt solid #8c3b28" fo:border-right="none" style:rotation-align="none" fo:border-top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8c3b28" fo:background-color="#fff2c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8c3b28" fo:background-color="#ddebf7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d7c7b4" style:diagonal-bl-tr="none" style:diagonal-tl-br="none" fo:border-left="none" fo:border-right="0.74pt solid #d7c7b4" style:rotation-align="none" fo:border-top="1.76pt solid #8c3b28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8c3b28" style:rotation-align="none" fo:border-top="0.74pt solid #d7c7b4"/>
    </style:style>
    <style:style style:name="ce19" style:family="table-cell" style:parent-style-name="Default">
      <style:table-cell-properties fo:border-bottom="1.76pt solid #8c3b28" style:diagonal-bl-tr="none" style:diagonal-tl-br="none" fo:border-left="none" fo:border-right="1.76pt solid #8c3b28" style:rotation-align="none" fo:border-top="none"/>
    </style:style>
    <style:style style:name="ce2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8c3b28" style:cell-protect="none" style:print-content="true" style:diagonal-bl-tr="none" style:diagonal-tl-br="none" fo:border-left="none" fo:border-right="1.76pt solid #8c3b28" style:rotation-align="none" fo:border-top="1.76pt solid #8c3b28"/>
    </style:style>
    <style:style style:name="ce33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8c3b28" fo:background-color="#eef2f6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1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2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3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4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7" office:value-type="string" calcext:value-type="string">
            <text:p>Color key</text:p>
          </table:table-cell>
          <table:table-cell table:number-columns-repeated="2"/>
          <table:table-cell table:style-name="ce7" office:value-type="string" calcext:value-type="string">
            <text:p>This workbook is for quoting only.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Yellow</text:p>
          </table:table-cell>
          <table:table-cell table:style-name="ce14" office:value-type="string" calcext:value-type="string">
            <text:p>Buyer input cells</text:p>
          </table:table-cell>
          <table:table-cell/>
          <table:table-cell table:style-name="ce16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Generated outputs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</table:table-row>
        <table:table-row table:style-name="ro3">
          <table:table-cell table:style-name="ce10" office:value-type="string" calcext:value-type="string">
            <text:p>White</text:p>
          </table:table-cell>
          <table:table-cell table:style-name="ce14" office:value-type="string" calcext:value-type="string">
            <text:p>Reference or helper text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Assumption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0" office:value-type="string" calcext:value-type="string">
            <text:p>Default hourly rate</text:p>
          </table:table-cell>
          <table:table-cell table:style-name="ce21" table:content-validation-name="val1" office:value-type="float" office:value="75" calcext:value-type="float">
            <text:p>$75.00</text:p>
          </table:table-cell>
          <table:table-cell table:style-name="ce24" office:value-type="string" calcext:value-type="string">
            <text:p>$/hour</text:p>
          </table:table-cell>
          <table:table-cell/>
          <table:table-cell table:style-name="ce7" office:value-type="string" calcext:value-type="string">
            <text:p>Guardrails</text:p>
          </table:table-cell>
        </table:table-row>
        <table:table-row table:style-name="ro3">
          <table:table-cell table:style-name="ce20" office:value-type="string" calcext:value-type="string">
            <text:p>Deposit percent</text:p>
          </table:table-cell>
          <table:table-cell table:style-name="ce22" table:content-validation-name="val1" office:value-type="percentage" office:value="0.3" calcext:value-type="percentage">
            <text:p>3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Quote Summary uses these values every time.</text:p>
          </table:table-cell>
        </table:table-row>
        <table:table-row table:style-name="ro3">
          <table:table-cell table:style-name="ce20" office:value-type="string" calcext:value-type="string">
            <text:p>Minimum job floor</text:p>
          </table:table-cell>
          <table:table-cell table:style-name="ce21" table:content-validation-name="val1" office:value-type="float" office:value="250" calcext:value-type="float">
            <text:p>$250.00</text:p>
          </table:table-cell>
          <table:table-cell table:style-name="ce24" office:value-type="string" calcext:value-type="string">
            <text:p>$ minimum</text:p>
          </table:table-cell>
          <table:table-cell/>
          <table:table-cell table:style-name="ce25" office:value-type="string" calcext:value-type="string">
            <text:p>Change deposit percent here to update the summary.</text:p>
          </table:table-cell>
        </table:table-row>
        <table:table-row table:style-name="ro3">
          <table:table-cell table:style-name="ce20" office:value-type="string" calcext:value-type="string">
            <text:p>Travel fee per quoted job</text:p>
          </table:table-cell>
          <table:table-cell table:style-name="ce21" table:content-validation-name="val1" office:value-type="float" office:value="45" calcext:value-type="float">
            <text:p>$45.00</text:p>
          </table:table-cell>
          <table:table-cell table:style-name="ce24" office:value-type="string" calcext:value-type="string">
            <text:p>$ flat</text:p>
          </table:table-cell>
          <table:table-cell/>
          <table:table-cell table:style-name="ce25" office:value-type="string" calcext:value-type="string">
            <text:p>Minimum job floor blocks send_ready when totals fall below it.</text:p>
          </table:table-cell>
        </table:table-row>
        <table:table-row table:style-name="ro3">
          <table:table-cell table:style-name="ce20" office:value-type="string" calcext:value-type="string">
            <text:p>Rush surcharge percent</text:p>
          </table:table-cell>
          <table:table-cell table:style-name="ce22" table:content-validation-name="val1" office:value-type="percentage" office:value="0.2" calcext:value-type="percentage">
            <text:p>2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Rush timing and surcharge work together.</text:p>
          </table:table-cell>
        </table:table-row>
        <table:table-row table:style-name="ro3">
          <table:table-cell table:style-name="ce20" office:value-type="string" calcext:value-type="string">
            <text:p>Standard turnaround days</text:p>
          </table:table-cell>
          <table:table-cell table:style-name="ce23" table:content-validation-name="val1" office:value-type="float" office:value="5" calcext:value-type="float">
            <text:p>5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Rush turnaround days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Material markup percent</text:p>
          </table:table-cell>
          <table:table-cell table:style-name="ce22" table:content-validation-name="val1" office:value-type="percentage" office:value="0.1" calcext:value-type="percentage">
            <text:p>10%</text:p>
          </table:table-cell>
          <table:table-cell table:style-name="ce24" office:value-type="string" calcext:value-type="string">
            <text:p>percent</text:p>
          </table:table-cell>
          <table:table-cell table:number-columns-repeated="2"/>
        </table:table-row>
        <table:table-row table:style-name="ro5" table:number-rows-repeated="104856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cope Inputs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3"/>
        <table:table-column table:style-name="co5" table:default-cell-style-name="ce3"/>
        <table:table-column table:style-name="co8" table:number-columns-repeated="4" table:default-cell-style-name="ce3"/>
        <table:table-column table:style-name="co9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Client name</text:p>
          </table:table-cell>
          <table:table-cell table:style-name="ce29" office:value-type="string" calcext:value-type="string" table:number-columns-spanned="2" table:number-rows-spanned="1">
            <text:p>Jordan Lee</text:p>
          </table:table-cell>
          <table:covered-table-cell table:style-name="ce32"/>
          <table:table-cell table:number-columns-repeated="6"/>
          <table:table-cell table:style-name="ce7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Job type</text:p>
          </table:table-cell>
          <table:table-cell table:style-name="ce29" office:value-type="string" calcext:value-type="string" table:number-columns-spanned="2" table:number-rows-spanned="1">
            <text:p>repair_bundle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Base total before rush</text:p>
          </table:table-cell>
          <table:table-cell table:style-name="ce40" table:formula="of:=ROUND(SUM([.H15:.H29])-[.B11];2)" office:value-type="float" office:value="585" calcext:value-type="float">
            <text:p>585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ite visi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Valid task rows</text:p>
          </table:table-cell>
          <table:table-cell table:style-name="ce40" table:formula="of:=COUNTIF([.B15:.B29];&quot;&lt;&gt;&quot;)" office:value-type="float" office:value="2" calcext:value-type="float">
            <text:p>2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Material lis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Travel lines</text:p>
          </table:table-cell>
          <table:table-cell table:style-name="ce40" table:formula="of:=COUNTIF([.F15:.F29];&quot;yes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cope confirm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ush request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equested days until start</text:p>
          </table:table-cell>
          <table:table-cell table:style-name="ce29" table:content-validation-name="val3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Discount amount</text:p>
          </table:table-cell>
          <table:table-cell table:style-name="ce29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27" office:value-type="string" calcext:value-type="string">
            <text:p>No.</text:p>
          </table:table-cell>
          <table:table-cell table:style-name="ce30" office:value-type="string" calcext:value-type="string">
            <text:p>Task name</text:p>
          </table:table-cell>
          <table:table-cell table:style-name="ce30" office:value-type="string" calcext:value-type="string">
            <text:p>Est. hours</text:p>
          </table:table-cell>
          <table:table-cell table:style-name="ce30" office:value-type="string" calcext:value-type="string">
            <text:p>Rate override</text:p>
          </table:table-cell>
          <table:table-cell table:style-name="ce30" office:value-type="string" calcext:value-type="string">
            <text:p>Material cost</text:p>
          </table:table-cell>
          <table:table-cell table:style-name="ce30" office:value-type="string" calcext:value-type="string">
            <text:p>Travel required</text:p>
          </table:table-cell>
          <table:table-cell table:style-name="ce30" office:value-type="string" calcext:value-type="string">
            <text:p>Labor subtotal</text:p>
          </table:table-cell>
          <table:table-cell table:style-name="ce37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Patch hallway drywall</text:p>
          </table:table-cell>
          <table:table-cell table:style-name="ce33" table:content-validation-name="val4" office:value-type="float" office:value="3" calcext:value-type="float">
            <text:p>3.00</text:p>
          </table:table-cell>
          <table:table-cell table:style-name="ce34" table:content-validation-name="val4"/>
          <table:table-cell table:style-name="ce34" table:content-validation-name="val4" office:value-type="float" office:value="60" calcext:value-type="float">
            <text:p>$60.00</text:p>
          </table:table-cell>
          <table:table-cell table:style-name="ce35" table:content-validation-name="val5" office:value-type="string" calcext:value-type="string">
            <text:p>yes</text:p>
          </table:table-cell>
          <table:table-cell table:style-name="ce36" table:formula="of:=IF([.B15]=&quot;&quot;;&quot;&quot;;ROUND([.C15]*IF([.D15]=&quot;&quot;;[$Assumptions.$B$4];[.D15]);2))" office:value-type="float" office:value="225" calcext:value-type="float">
            <text:p>$225.00</text:p>
          </table:table-cell>
          <table:table-cell table:style-name="ce38" table:formula="of:=IF([.B15]=&quot;&quot;;&quot;&quot;;ROUND([.G15]+([.E15]*(1+[$Assumptions.$B$11]))+IF([.F15]=&quot;yes&quot;;[$Assumptions.$B$7];0);2))" office:value-type="float" office:value="336" calcext:value-type="float">
            <text:p>$336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Install faucet</text:p>
          </table:table-cell>
          <table:table-cell table:style-name="ce33" table:content-validation-name="val4" office:value-type="float" office:value="2" calcext:value-type="float">
            <text:p>2.00</text:p>
          </table:table-cell>
          <table:table-cell table:style-name="ce34" table:content-validation-name="val4"/>
          <table:table-cell table:style-name="ce34" table:content-validation-name="val4" office:value-type="float" office:value="90" calcext:value-type="float">
            <text:p>$90.00</text:p>
          </table:table-cell>
          <table:table-cell table:style-name="ce35" table:content-validation-name="val5" office:value-type="string" calcext:value-type="string">
            <text:p>no</text:p>
          </table:table-cell>
          <table:table-cell table:style-name="ce36" table:formula="of:=IF([.B16]=&quot;&quot;;&quot;&quot;;ROUND([.C16]*IF([.D16]=&quot;&quot;;[$Assumptions.$B$4];[.D16]);2))" office:value-type="float" office:value="150" calcext:value-type="float">
            <text:p>$150.00</text:p>
          </table:table-cell>
          <table:table-cell table:style-name="ce38" table:formula="of:=IF([.B16]=&quot;&quot;;&quot;&quot;;ROUND([.G16]+([.E16]*(1+[$Assumptions.$B$11]))+IF([.F16]=&quot;yes&quot;;[$Assumptions.$B$7];0);2))" office:value-type="float" office:value="249" calcext:value-type="float">
            <text:p>$249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7]=&quot;&quot;;&quot;&quot;;ROUND([.C17]*IF([.D17]=&quot;&quot;;[$Assumptions.$B$4];[.D17]);2))">
            <text:p/>
          </table:table-cell>
          <table:table-cell table:style-name="ce38"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8]=&quot;&quot;;&quot;&quot;;ROUND([.C18]*IF([.D18]=&quot;&quot;;[$Assumptions.$B$4];[.D18]);2))">
            <text:p/>
          </table:table-cell>
          <table:table-cell table:style-name="ce38"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9]=&quot;&quot;;&quot;&quot;;ROUND([.C19]*IF([.D19]=&quot;&quot;;[$Assumptions.$B$4];[.D19]);2))">
            <text:p/>
          </table:table-cell>
          <table:table-cell table:style-name="ce38"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0]=&quot;&quot;;&quot;&quot;;ROUND([.C20]*IF([.D20]=&quot;&quot;;[$Assumptions.$B$4];[.D20]);2))">
            <text:p/>
          </table:table-cell>
          <table:table-cell table:style-name="ce38"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1]=&quot;&quot;;&quot;&quot;;ROUND([.C21]*IF([.D21]=&quot;&quot;;[$Assumptions.$B$4];[.D21]);2))">
            <text:p/>
          </table:table-cell>
          <table:table-cell table:style-name="ce38"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2]=&quot;&quot;;&quot;&quot;;ROUND([.C22]*IF([.D22]=&quot;&quot;;[$Assumptions.$B$4];[.D22]);2))">
            <text:p/>
          </table:table-cell>
          <table:table-cell table:style-name="ce38"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3]=&quot;&quot;;&quot;&quot;;ROUND([.C23]*IF([.D23]=&quot;&quot;;[$Assumptions.$B$4];[.D23]);2))">
            <text:p/>
          </table:table-cell>
          <table:table-cell table:style-name="ce38"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4]=&quot;&quot;;&quot;&quot;;ROUND([.C24]*IF([.D24]=&quot;&quot;;[$Assumptions.$B$4];[.D24]);2))">
            <text:p/>
          </table:table-cell>
          <table:table-cell table:style-name="ce38"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5]=&quot;&quot;;&quot;&quot;;ROUND([.C25]*IF([.D25]=&quot;&quot;;[$Assumptions.$B$4];[.D25]);2))">
            <text:p/>
          </table:table-cell>
          <table:table-cell table:style-name="ce38"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6]=&quot;&quot;;&quot;&quot;;ROUND([.C26]*IF([.D26]=&quot;&quot;;[$Assumptions.$B$4];[.D26]);2))">
            <text:p/>
          </table:table-cell>
          <table:table-cell table:style-name="ce38"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7]=&quot;&quot;;&quot;&quot;;ROUND([.C27]*IF([.D27]=&quot;&quot;;[$Assumptions.$B$4];[.D27]);2))">
            <text:p/>
          </table:table-cell>
          <table:table-cell table:style-name="ce38"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8]=&quot;&quot;;&quot;&quot;;ROUND([.C28]*IF([.D28]=&quot;&quot;;[$Assumptions.$B$4];[.D28]);2))">
            <text:p/>
          </table:table-cell>
          <table:table-cell table:style-name="ce38"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9]=&quot;&quot;;&quot;&quot;;ROUND([.C29]*IF([.D29]=&quot;&quot;;[$Assumptions.$B$4];[.D29]);2))">
            <text:p/>
          </table:table-cell>
          <table:table-cell table:style-name="ce38"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5" table:number-rows-repeated="1048546">
          <table:table-cell table:number-columns-repeated="11"/>
          <table:table-cell table:style-name="Default" table:number-columns-repeated="16373"/>
        </table:table-row>
        <table:table-row table:style-name="ro5">
          <table:table-cell table:number-columns-repeated="11"/>
          <table:table-cell table:style-name="Default" table:number-columns-repeated="16373"/>
        </table:table-row>
      </table:table>
      <table:table table:name="Quote Summary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6">
          <table:table-cell table:style-name="ce41" office:value-type="string" calcext:value-type="string">
            <text:p>Quote total</text:p>
          </table:table-cell>
          <table:table-cell table:style-name="ce42" table:formula="of:=ROUND(SUM([$'Scope Inputs'.H15:.H29])*(1+IF([$'Scope Inputs'.B9]=&quot;yes&quot;;[$Assumptions.$B$8];0))-[$'Scope Inputs'.B11];2)" office:value-type="float" office:value="702" calcext:value-type="float">
            <text:p>$702.00</text:p>
          </table:table-cell>
          <table:table-cell/>
          <table:table-cell table:style-name="ce7" office:value-type="string" calcext:value-type="string">
            <text:p>What this means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Deposit amount</text:p>
          </table:table-cell>
          <table:table-cell table:style-name="ce42" table:formula="of:=ROUND([.B8]*[$Assumptions.$B$5];2)" office:value-type="float" office:value="210.6" calcext:value-type="float">
            <text:p>$210.60</text:p>
          </table:table-cell>
          <table:table-cell/>
          <table:table-cell table:style-name="ce16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</table:table-row>
        <table:table-row table:style-name="ro6">
          <table:table-cell table:style-name="ce41" office:value-type="string" calcext:value-type="string">
            <text:p>Delivery window</text:p>
          </table:table-cell>
          <table:table-cell table:style-name="ce43" table:formula="of:=IF([$'Scope Inputs'.B9]=&quot;yes&quot;;TEXT([$Assumptions.$B$10];&quot;0&quot;)&amp;&quot; business days&quot;;TEXT([$Assumptions.$B$9];&quot;0&quot;)&amp;&quot; business days&quot;)" office:value-type="string" office:string-value="2 business days" calcext:value-type="string">
            <text:p>2 business days</text:p>
          </table:table-cell>
          <table:table-cell/>
          <table:table-cell table:style-name="ce16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Quote confidence state</text:p>
          </table:table-cell>
          <table:table-cell table:style-name="ce43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send_ready" calcext:value-type="string">
            <text:p>send_ready</text:p>
          </table:table-cell>
          <table:table-cell/>
          <table:table-cell table:style-name="ce16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Recommended next step</text:p>
          </table:table-cell>
          <table:table-cell table:style-name="ce44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Send the quote with deposit and timeline" calcext:value-type="string">
            <text:p>Send the quote with deposit and timeline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6">
          <table:table-cell table:style-name="ce41" office:value-type="string" calcext:value-type="string">
            <text:p>Minimum profitable floor</text:p>
          </table:table-cell>
          <table:table-cell table:style-name="ce42" table:formula="of:=[$Assumptions.$B$6]" office:value-type="float" office:value="250" calcext:value-type="float">
            <text:p>$250.00</text:p>
          </table:table-cell>
          <table:table-cell/>
          <table:table-cell table:style-name="ce7" office:value-type="string" calcext:value-type="string">
            <text:p>Proof checklist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Quote margin buffer</text:p>
          </table:table-cell>
          <table:table-cell table:style-name="ce42" table:formula="of:=ROUND([.B8]-[.B15];2)" office:value-type="float" office:value="452" calcext:value-type="float">
            <text:p>$452.00</text:p>
          </table:table-cell>
          <table:table-cell/>
          <table:table-cell table:style-name="ce16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</table:table-row>
        <table:table-row table:style-name="ro5" table:number-rows-repeated="104855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aved Quotes" table:style-name="ta5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3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/>
        </table:table-row>
        <table:table-row table:style-name="ro3">
          <table:table-cell table:number-columns-repeated="10"/>
        </table:table-row>
        <table:table-row table:style-name="ro8">
          <table:table-cell table:style-name="ce27" office:value-type="string" calcext:value-type="string">
            <text:p>Quote date</text:p>
          </table:table-cell>
          <table:table-cell table:style-name="ce30" office:value-type="string" calcext:value-type="string">
            <text:p>Client</text:p>
          </table:table-cell>
          <table:table-cell table:style-name="ce30" office:value-type="string" calcext:value-type="string">
            <text:p>Job type</text:p>
          </table:table-cell>
          <table:table-cell table:style-name="ce30" office:value-type="string" calcext:value-type="string">
            <text:p>Quote total</text:p>
          </table:table-cell>
          <table:table-cell table:style-name="ce30" office:value-type="string" calcext:value-type="string">
            <text:p>Deposit</text:p>
          </table:table-cell>
          <table:table-cell table:style-name="ce30" office:value-type="string" calcext:value-type="string">
            <text:p>Delivery window</text:p>
          </table:table-cell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Next step</text:p>
          </table:table-cell>
          <table:table-cell table:style-name="ce30" office:value-type="string" calcext:value-type="string">
            <text:p>Notes</text:p>
          </table:table-cell>
          <table:table-cell table:style-name="ce37" office:value-type="string" calcext:value-type="string">
            <text:p>Version</text:p>
          </table:table-cell>
        </table:table-row>
        <table:table-row table:style-name="ro1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Jordan Lee</text:p>
          </table:table-cell>
          <table:table-cell table:style-name="ce31" office:value-type="string" calcext:value-type="string">
            <text:p>repair_bundle</text:p>
          </table:table-cell>
          <table:table-cell table:style-name="ce34" office:value-type="float" office:value="585" calcext:value-type="float">
            <text:p>$585.00</text:p>
          </table:table-cell>
          <table:table-cell table:style-name="ce34" office:value-type="float" office:value="175.5" calcext:value-type="float">
            <text:p>$175.50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send_ready</text:p>
          </table:table-cell>
          <table:table-cell table:style-name="ce46" office:value-type="string" calcext:value-type="string">
            <text:p>Send the quote with deposit and timeline</text:p>
          </table:table-cell>
          <table:table-cell table:style-name="ce46" office:value-type="string" calcext:value-type="string">
            <text:p>Seeded standard quo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9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Partial example</text:p>
          </table:table-cell>
          <table:table-cell table:style-name="ce31" office:value-type="string" calcext:value-type="string">
            <text:p>drywall_patch</text:p>
          </table:table-cell>
          <table:table-cell table:style-name="ce34" office:value-type="float" office:value="188.5" calcext:value-type="float">
            <text:p>$188.50</text:p>
          </table:table-cell>
          <table:table-cell table:style-name="ce34" office:value-type="float" office:value="56.55" calcext:value-type="float">
            <text:p>$56.55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clarify_scope</text:p>
          </table:table-cell>
          <table:table-cell table:style-name="ce46" office:value-type="string" calcext:value-type="string">
            <text:p>Ask for missing scope details before sending the quote</text:p>
          </table:table-cell>
          <table:table-cell table:style-name="ce46" office:value-type="string" calcext:value-type="string">
            <text:p>Shows blocked send sta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8" table:number-rows-repeated="48">
          <table:table-cell table:style-name="ce45"/>
          <table:table-cell table:style-name="ce31" table:number-columns-repeated="2"/>
          <table:table-cell table:style-name="ce34" table:number-columns-repeated="2"/>
          <table:table-cell table:style-name="ce35"/>
          <table:table-cell table:style-name="ce31"/>
          <table:table-cell table:style-name="ce46" table:number-columns-repeated="2"/>
          <table:table-cell table:style-name="ce47"/>
        </table:table-row>
        <table:table-row table:style-name="ro5" table:number-rows-repeated="1048521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en-US</dc:language>
    <meta:creation-date>2026-06-30T07:36:12</meta:creation-date>
    <dc:date>2026-06-30T07:39:08</dc:date>
    <meta:editing-cycles>0</meta:editing-cycles>
    <meta:generator>LibreOffice/26.2.4.2$MacOSX_AARCH64 LibreOffice_project/0229ac93fcf0d7cbc6376066c6f35021cef002dc</meta:generator>
    <meta:document-statistic meta:table-count="5" meta:cell-count="196" meta:object-count="0"/>
    <meta:user-defined meta:name="AppVersion">3.1</meta:user-defined>
  </office:meta>
</office:document-meta>
</file>