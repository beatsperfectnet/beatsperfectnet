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3.3917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85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6957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5728in" fo:break-before="auto" style:use-optimal-row-height="false"/>
    </style:style>
    <style:style style:name="ta1" style:family="table" style:master-page-name="PageStyle_5f_Start_20_Here">
      <style:table-properties table:display="true" style:writing-mode="lr-tb"/>
    </style:style>
    <style:style style:name="ta2" style:family="table" style:master-page-name="PageStyle_5f_Assumptions">
      <style:table-properties table:display="true" style:writing-mode="lr-tb"/>
    </style:style>
    <style:style style:name="ta3" style:family="table" style:master-page-name="PageStyle_5f_Scope_20_Inputs">
      <style:table-properties table:display="true" style:writing-mode="lr-tb"/>
    </style:style>
    <style:style style:name="ta4" style:family="table" style:master-page-name="PageStyle_5f_Quote_20_Summary">
      <style:table-properties table:display="true" style:writing-mode="lr-tb"/>
    </style:style>
    <style:style style:name="ta5" style:family="table" style:master-page-name="PageStyle_5f_Saved_20_Quot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8c3b2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Display" fo:font-size="18pt" fo:font-style="normal" fo:text-shadow="none" style:text-underline-style="none" fo:font-weight="bold" style:font-size-asian="18pt" style:font-style-asian="normal" style:font-weight-asian="bold" style:font-name-complex="Aptos Display" style:font-size-complex="1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5f1e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italic" fo:text-shadow="none" style:text-underline-style="none" fo:font-weight="normal" style:font-size-asian="10pt" style:font-style-asian="italic" style:font-weight-asian="normal" style:font-name-complex="Aptos" style:font-size-complex="10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0.74pt solid #d7c7b4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wrap" fo:border-left="1.76pt solid #8c3b28" style:direction="ltr" fo:border-right="1.76pt solid #8c3b28" style:rotation-angle="0" style:rotation-align="none" style:shrink-to-fit="false" fo:border-top="0.74pt solid #d7c7b4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8c3b28" style:diagonal-bl-tr="none" style:diagonal-tl-br="none" fo:border-left="1.76pt solid #8c3b28" fo:border-right="none" style:rotation-align="none" fo:border-top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bold" style:font-size-asian="11pt" style:font-style-asian="normal" style:font-weight-asian="bold" style:font-name-complex="Aptos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8c3b28" fo:background-color="#fff2c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8c3b28" fo:background-color="#ddebf7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d7c7b4" style:diagonal-bl-tr="none" style:diagonal-tl-br="none" fo:border-left="none" fo:border-right="0.74pt solid #d7c7b4" style:rotation-align="none" fo:border-top="1.76pt solid #8c3b28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7c7b4"/>
    </style:style>
    <style:style style:name="ce13" style:family="table-cell" style:parent-style-name="Default">
      <style:table-cell-properties fo:border-bottom="1.76pt solid #8c3b28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d7c7b4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8c3b28" style:rotation-align="none" fo:border-top="0.74pt solid #d7c7b4"/>
    </style:style>
    <style:style style:name="ce19" style:family="table-cell" style:parent-style-name="Default">
      <style:table-cell-properties fo:border-bottom="1.76pt solid #8c3b28" style:diagonal-bl-tr="none" style:diagonal-tl-br="none" fo:border-left="none" fo:border-right="1.76pt solid #8c3b28" style:rotation-align="none" fo:border-top="none"/>
    </style:style>
    <style:style style:name="ce20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0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">
      <style:table-cell-properties fo:border-bottom="1.76pt solid #8c3b28" fo:background-color="#fff2cc" style:cell-protect="none" style:print-content="true" style:diagonal-bl-tr="none" style:diagonal-tl-br="none" style:text-align-source="value-type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8c3b28" fo:background-color="#fffdfc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9pt" fo:font-style="normal" fo:text-shadow="none" style:text-underline-style="none" fo:font-weight="bold" style:font-size-asian="9pt" style:font-style-asian="normal" style:font-weight-asian="bold" style:font-name-complex="Aptos" style:font-size-complex="9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1.76pt solid #8c3b28" fo:background-color="#fffdfc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8c3b28" style:cell-protect="none" style:print-content="true" style:diagonal-bl-tr="none" style:diagonal-tl-br="none" fo:border-left="none" fo:border-right="1.76pt solid #8c3b28" style:rotation-align="none" fo:border-top="1.76pt solid #8c3b28"/>
    </style:style>
    <style:style style:name="ce33" style:family="table-cell" style:parent-style-name="Default" style:data-style-name="N2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39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1.76pt solid #8c3b28" style:diagonal-bl-tr="none" style:diagonal-tl-br="none" style:text-align-source="value-type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1.76pt solid #8c3b28" fo:background-color="#eef2f6" style:diagonal-bl-tr="none" style:diagonal-tl-br="none" style:text-align-source="value-type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1.76pt solid #8c3b28" fo:background-color="#f8f4e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name-complex="Aptos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39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fo:border-bottom="1.76pt solid #8c3b28" fo:background-color="#ddebf7" style:diagonal-bl-tr="none" style:diagonal-tl-br="none" style:text-align-source="fix" style:repeat-content="false" fo:wrap-option="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bold" style:font-size-asian="12pt" style:font-style-asian="normal" style:font-weight-asian="bold" style:font-name-complex="Aptos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no-wrap" fo:border-left="1.76pt solid #8c3b28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8c3b28" fo:background-color="#fff2cc" style:cell-protect="none" style:print-content="true" style:diagonal-bl-tr="none" style:diagonal-tl-br="none" style:text-align-source="fix" style:repeat-content="false" fo:wrap-option="wrap" fo:border-left="0.74pt solid #d7c7b4" style:direction="ltr" fo:border-right="0.74pt solid #d7c7b4" style:rotation-angle="0" style:rotation-align="none" style:shrink-to-fit="false" fo:border-top="1.76pt solid #8c3b28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8c3b28" fo:background-color="#ddebf7" style:diagonal-bl-tr="none" style:diagonal-tl-br="none" style:text-align-source="fix" style:repeat-content="false" fo:wrap-option="no-wrap" fo:border-left="0.74pt solid #d7c7b4" style:direction="ltr" fo:border-right="1.76pt solid #8c3b28" style:rotation-angle="0" style:rotation-align="none" style:shrink-to-fit="false" fo:border-top="1.76pt solid #8c3b28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Saved Quotes'.B4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2" table:condition="of:cell-content-is-in-list(&quot;yes&quot;;&quot;no&quot;)" table:allow-empty-cell="false" table:display-list="unsorted" table:base-cell-address="'Saved Quotes'.B6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  <table:content-validation table:name="val3" table:condition="of:cell-content-is-decimal-number() and cell-content()&gt;=0" table:allow-empty-cell="true" table:base-cell-address="'Saved Quotes'.B10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4" table:condition="of:cell-content-is-decimal-number() and cell-content()&gt;=0" table:allow-empty-cell="true" table:base-cell-address="'Saved Quotes'.C15">
          <table:error-message table:message-type="stop" table:title="Numbers only" table:display="false">
            <text:p>Enter a number that is zero or higher.</text:p>
          </table:error-message>
        </table:content-validation>
        <table:content-validation table:name="val5" table:condition="of:cell-content-is-in-list(&quot;yes&quot;;&quot;no&quot;)" table:allow-empty-cell="false" table:display-list="unsorted" table:base-cell-address="'Saved Quotes'.F15">
          <table:help-message table:title="Allowed values" table:display="false">
            <text:p>Use yes or no.</text:p>
          </table:help-message>
          <table:error-message table:message-type="stop" table:title="Use yes or no" table:display="false">
            <text:p>Pick yes or no from the dropdown.</text:p>
          </table:error-message>
        </table:content-validation>
      </table:content-validations>
      <table:table table:name="Start Here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3" table:default-cell-style-name="ce3"/>
        <table:table-column table:style-name="co4" table:number-columns-repeated="16377"/>
        <table:table-row table:style-name="ro1">
          <table:table-cell table:style-name="ce1" office:value-type="string" calcext:value-type="string" table:number-columns-spanned="7" table:number-rows-spanned="1">
            <text:p>Handyman Quote Readiness Planner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Quote the job, check the floor, and know whether to send or clarify before you reply.</text:p>
          </table:table-cell>
          <table:covered-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1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Open Assumptions and confirm your hourly rate, minimum job floor, deposit policy, and standard timing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2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Go to Scope Inputs and complete the readiness checks before touching the line item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3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Enter task rows with hours, material cost, and travel yes/no. Yellow cells are yours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Step 4</text:p>
          </table:table-cell>
          <table:covered-table-cell table:style-name="ce11"/>
          <table:table-cell table:style-name="ce15" table:number-columns-repeated="2"/>
          <table:table-cell table:style-name="ce17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5" table:number-rows-spanned="2">
            <text:p>Read Quote Summary. Send only when the state says send_ready. Otherwise follow the next-step guidance.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3">
          <table:covered-table-cell table:style-name="ce6"/>
          <table:covered-table-cell table:number-columns-repeated="3" table:style-name="ce13"/>
          <table:covered-table-cell table:style-name="ce19"/>
          <table:table-cell table:number-columns-repeated="2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7" office:value-type="string" calcext:value-type="string">
            <text:p>Color key</text:p>
          </table:table-cell>
          <table:table-cell table:number-columns-repeated="2"/>
          <table:table-cell table:style-name="ce7" office:value-type="string" calcext:value-type="string">
            <text:p>This workbook is for quoting only.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Yellow</text:p>
          </table:table-cell>
          <table:table-cell table:style-name="ce14" office:value-type="string" calcext:value-type="string">
            <text:p>Buyer input cells</text:p>
          </table:table-cell>
          <table:table-cell/>
          <table:table-cell table:style-name="ce16" office:value-type="string" calcext:value-type="string" table:number-columns-spanned="4" table:number-rows-spanned="1">
            <text:p>• No invoicing, CRM, dispatch, or auto-emailing.</text:p>
          </table:table-cell>
          <table:covered-table-cell table:number-columns-repeated="3"/>
        </table:table-row>
        <table:table-row table:style-name="ro3">
          <table:table-cell table:style-name="ce9" office:value-type="string" calcext:value-type="string">
            <text:p>Blue</text:p>
          </table:table-cell>
          <table:table-cell table:style-name="ce14" office:value-type="string" calcext:value-type="string">
            <text:p>Generated outputs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clarify_scope, ask for more details before sending.</text:p>
          </table:table-cell>
          <table:covered-table-cell table:number-columns-repeated="3"/>
        </table:table-row>
        <table:table-row table:style-name="ro3">
          <table:table-cell table:style-name="ce10" office:value-type="string" calcext:value-type="string">
            <text:p>White</text:p>
          </table:table-cell>
          <table:table-cell table:style-name="ce14" office:value-type="string" calcext:value-type="string">
            <text:p>Reference or helper text</text:p>
          </table:table-cell>
          <table:table-cell/>
          <table:table-cell table:style-name="ce16" office:value-type="string" calcext:value-type="string" table:number-columns-spanned="4" table:number-rows-spanned="1">
            <text:p>• If the state is below_floor, adjust scope or decline the job.</text:p>
          </table:table-cell>
          <table:covered-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4" table:number-rows-spanned="1">
            <text:p>• If the state is unrealistic_timeline, reset expectations before you quote.</text:p>
          </table:table-cell>
          <table:covered-table-cell table:number-columns-repeated="3"/>
        </table:table-row>
        <table:table-row table:style-name="ro5" table:number-rows-repeated="104854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Assumptions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Assumptions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Set the business defaults that every quote uses unless you override them.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20" office:value-type="string" calcext:value-type="string">
            <text:p>Default hourly rate</text:p>
          </table:table-cell>
          <table:table-cell table:style-name="ce21" table:content-validation-name="val1" office:value-type="float" office:value="75" calcext:value-type="float">
            <text:p>$75.00</text:p>
          </table:table-cell>
          <table:table-cell table:style-name="ce24" office:value-type="string" calcext:value-type="string">
            <text:p>$/hour</text:p>
          </table:table-cell>
          <table:table-cell/>
          <table:table-cell table:style-name="ce7" office:value-type="string" calcext:value-type="string">
            <text:p>Guardrails</text:p>
          </table:table-cell>
        </table:table-row>
        <table:table-row table:style-name="ro3">
          <table:table-cell table:style-name="ce20" office:value-type="string" calcext:value-type="string">
            <text:p>Deposit percent</text:p>
          </table:table-cell>
          <table:table-cell table:style-name="ce22" table:content-validation-name="val1" office:value-type="percentage" office:value="0.5" calcext:value-type="percentage">
            <text:p>5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Quote Summary uses these values every time.</text:p>
          </table:table-cell>
        </table:table-row>
        <table:table-row table:style-name="ro3">
          <table:table-cell table:style-name="ce20" office:value-type="string" calcext:value-type="string">
            <text:p>Minimum job floor</text:p>
          </table:table-cell>
          <table:table-cell table:style-name="ce21" table:content-validation-name="val1" office:value-type="float" office:value="250" calcext:value-type="float">
            <text:p>$250.00</text:p>
          </table:table-cell>
          <table:table-cell table:style-name="ce24" office:value-type="string" calcext:value-type="string">
            <text:p>$ minimum</text:p>
          </table:table-cell>
          <table:table-cell/>
          <table:table-cell table:style-name="ce25" office:value-type="string" calcext:value-type="string">
            <text:p>Change deposit percent here to update the summary.</text:p>
          </table:table-cell>
        </table:table-row>
        <table:table-row table:style-name="ro3">
          <table:table-cell table:style-name="ce20" office:value-type="string" calcext:value-type="string">
            <text:p>Travel fee per quoted job</text:p>
          </table:table-cell>
          <table:table-cell table:style-name="ce21" table:content-validation-name="val1" office:value-type="float" office:value="45" calcext:value-type="float">
            <text:p>$45.00</text:p>
          </table:table-cell>
          <table:table-cell table:style-name="ce24" office:value-type="string" calcext:value-type="string">
            <text:p>$ flat</text:p>
          </table:table-cell>
          <table:table-cell/>
          <table:table-cell table:style-name="ce25" office:value-type="string" calcext:value-type="string">
            <text:p>Minimum job floor blocks send_ready when totals fall below it.</text:p>
          </table:table-cell>
        </table:table-row>
        <table:table-row table:style-name="ro3">
          <table:table-cell table:style-name="ce20" office:value-type="string" calcext:value-type="string">
            <text:p>Rush surcharge percent</text:p>
          </table:table-cell>
          <table:table-cell table:style-name="ce22" table:content-validation-name="val1" office:value-type="percentage" office:value="0.2" calcext:value-type="percentage">
            <text:p>20%</text:p>
          </table:table-cell>
          <table:table-cell table:style-name="ce24" office:value-type="string" calcext:value-type="string">
            <text:p>percent</text:p>
          </table:table-cell>
          <table:table-cell/>
          <table:table-cell table:style-name="ce25" office:value-type="string" calcext:value-type="string">
            <text:p>Rush timing and surcharge work together.</text:p>
          </table:table-cell>
        </table:table-row>
        <table:table-row table:style-name="ro3">
          <table:table-cell table:style-name="ce20" office:value-type="string" calcext:value-type="string">
            <text:p>Standard turnaround days</text:p>
          </table:table-cell>
          <table:table-cell table:style-name="ce23" table:content-validation-name="val1" office:value-type="float" office:value="5" calcext:value-type="float">
            <text:p>5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Rush turnaround days</text:p>
          </table:table-cell>
          <table:table-cell table:style-name="ce23" table:content-validation-name="val1" office:value-type="float" office:value="2" calcext:value-type="float">
            <text:p>2</text:p>
          </table:table-cell>
          <table:table-cell table:style-name="ce24" office:value-type="string" calcext:value-type="string">
            <text:p>business days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Material markup percent</text:p>
          </table:table-cell>
          <table:table-cell table:style-name="ce22" table:content-validation-name="val1" office:value-type="percentage" office:value="0.1" calcext:value-type="percentage">
            <text:p>10%</text:p>
          </table:table-cell>
          <table:table-cell table:style-name="ce24" office:value-type="string" calcext:value-type="string">
            <text:p>percent</text:p>
          </table:table-cell>
          <table:table-cell table:number-columns-repeated="2"/>
        </table:table-row>
        <table:table-row table:style-name="ro5" table:number-rows-repeated="104856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cope Inputs" table:style-name="ta3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7" table:default-cell-style-name="ce3"/>
        <table:table-column table:style-name="co5" table:default-cell-style-name="ce3"/>
        <table:table-column table:style-name="co8" table:number-columns-repeated="4" table:default-cell-style-name="ce3"/>
        <table:table-column table:style-name="co9" table:number-columns-repeated="2" table:default-cell-style-name="ce3"/>
        <table:table-column table:style-name="co4" table:number-columns-repeated="3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 table:number-columns-spanned="8" table:number-rows-spanned="1">
            <text:p>Scope Inputs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 table:number-columns-spanned="8" table:number-rows-spanned="1">
            <text:p>Complete readiness checks first, then enter line items. Only yellow cells should be edited.</text:p>
          </table:table-cell>
          <table:covered-table-cell table:number-columns-repeated="7"/>
          <table:table-cell table:number-columns-repeated="3"/>
          <table:table-cell table:style-name="Default" table:number-columns-repeated="16373"/>
        </table:table-row>
        <table:table-row table:style-name="ro3">
          <table:table-cell table:number-columns-repeated="11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Client name</text:p>
          </table:table-cell>
          <table:table-cell table:style-name="ce29" office:value-type="string" calcext:value-type="string" table:number-columns-spanned="2" table:number-rows-spanned="1">
            <text:p>Jordan Lee</text:p>
          </table:table-cell>
          <table:covered-table-cell table:style-name="ce32"/>
          <table:table-cell table:number-columns-repeated="6"/>
          <table:table-cell table:style-name="ce7" office:value-type="string" calcext:value-type="string">
            <text:p>Helper totals</text:p>
          </table:table-cell>
          <table:table-cell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Job type</text:p>
          </table:table-cell>
          <table:table-cell table:style-name="ce29" office:value-type="string" calcext:value-type="string" table:number-columns-spanned="2" table:number-rows-spanned="1">
            <text:p>repair_bundle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Base total before rush</text:p>
          </table:table-cell>
          <table:table-cell table:style-name="ce40" table:formula="of:=ROUND(SUM([.H15:.H29])-[.B11];2)" office:value-type="float" office:value="585" calcext:value-type="float">
            <text:p>585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ite visit complete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Valid task rows</text:p>
          </table:table-cell>
          <table:table-cell table:style-name="ce40" table:formula="of:=COUNTIF([.B15:.B29];&quot;&lt;&gt;&quot;)" office:value-type="float" office:value="2" calcext:value-type="float">
            <text:p>2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Material list complete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6"/>
          <table:table-cell table:style-name="ce39" office:value-type="string" calcext:value-type="string">
            <text:p>Travel lines</text:p>
          </table:table-cell>
          <table:table-cell table:style-name="ce40" table:formula="of:=COUNTIF([.F15:.F29];&quot;yes&quot;)"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Scope confirmed</text:p>
          </table:table-cell>
          <table:table-cell table:style-name="ce29" table:content-validation-name="val2" office:value-type="string" calcext:value-type="string" table:number-columns-spanned="2" table:number-rows-spanned="1">
            <text:p>yes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ush requested</text:p>
          </table:table-cell>
          <table:table-cell table:style-name="ce29" table:content-validation-name="val2" office:value-type="string" calcext:value-type="string" table:number-columns-spanned="2" table:number-rows-spanned="1">
            <text:p>no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Requested days until start</text:p>
          </table:table-cell>
          <table:table-cell table:style-name="ce29" table:content-validation-name="val3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2">
          <table:table-cell table:style-name="ce26" office:value-type="string" calcext:value-type="string">
            <text:p>Discount amount</text:p>
          </table:table-cell>
          <table:table-cell table:style-name="ce29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number-columns-repeated="8"/>
          <table:table-cell table:style-name="Default" table:number-columns-repeated="16373"/>
        </table:table-row>
        <table:table-row table:style-name="ro3" table:number-rows-repeated="2">
          <table:table-cell table:number-columns-repeated="11"/>
          <table:table-cell table:style-name="Default" table:number-columns-repeated="16373"/>
        </table:table-row>
        <table:table-row table:style-name="ro3">
          <table:table-cell table:style-name="ce27" office:value-type="string" calcext:value-type="string">
            <text:p>No.</text:p>
          </table:table-cell>
          <table:table-cell table:style-name="ce30" office:value-type="string" calcext:value-type="string">
            <text:p>Task name</text:p>
          </table:table-cell>
          <table:table-cell table:style-name="ce30" office:value-type="string" calcext:value-type="string">
            <text:p>Est. hours</text:p>
          </table:table-cell>
          <table:table-cell table:style-name="ce30" office:value-type="string" calcext:value-type="string">
            <text:p>Rate override</text:p>
          </table:table-cell>
          <table:table-cell table:style-name="ce30" office:value-type="string" calcext:value-type="string">
            <text:p>Material cost</text:p>
          </table:table-cell>
          <table:table-cell table:style-name="ce30" office:value-type="string" calcext:value-type="string">
            <text:p>Travel required</text:p>
          </table:table-cell>
          <table:table-cell table:style-name="ce30" office:value-type="string" calcext:value-type="string">
            <text:p>Labor subtotal</text:p>
          </table:table-cell>
          <table:table-cell table:style-name="ce37" office:value-type="string" calcext:value-type="string">
            <text:p>Line subtotal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Patch hallway drywall</text:p>
          </table:table-cell>
          <table:table-cell table:style-name="ce33" table:content-validation-name="val4" office:value-type="float" office:value="3" calcext:value-type="float">
            <text:p>3.00</text:p>
          </table:table-cell>
          <table:table-cell table:style-name="ce34" table:content-validation-name="val4"/>
          <table:table-cell table:style-name="ce34" table:content-validation-name="val4" office:value-type="float" office:value="60" calcext:value-type="float">
            <text:p>$60.00</text:p>
          </table:table-cell>
          <table:table-cell table:style-name="ce35" table:content-validation-name="val5" office:value-type="string" calcext:value-type="string">
            <text:p>yes</text:p>
          </table:table-cell>
          <table:table-cell table:style-name="ce36" table:formula="of:=IF([.B15]=&quot;&quot;;&quot;&quot;;ROUND([.C15]*IF([.D15]=&quot;&quot;;[$Assumptions.$B$4];[.D15]);2))" office:value-type="float" office:value="225" calcext:value-type="float">
            <text:p>$225.00</text:p>
          </table:table-cell>
          <table:table-cell table:style-name="ce38" table:formula="of:=IF([.B15]=&quot;&quot;;&quot;&quot;;ROUND([.G15]+([.E15]*(1+[$Assumptions.$B$11]))+IF([.F15]=&quot;yes&quot;;[$Assumptions.$B$7];0);2))" office:value-type="float" office:value="336" calcext:value-type="float">
            <text:p>$336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Install faucet</text:p>
          </table:table-cell>
          <table:table-cell table:style-name="ce33" table:content-validation-name="val4" office:value-type="float" office:value="2" calcext:value-type="float">
            <text:p>2.00</text:p>
          </table:table-cell>
          <table:table-cell table:style-name="ce34" table:content-validation-name="val4"/>
          <table:table-cell table:style-name="ce34" table:content-validation-name="val4" office:value-type="float" office:value="90" calcext:value-type="float">
            <text:p>$90.00</text:p>
          </table:table-cell>
          <table:table-cell table:style-name="ce35" table:content-validation-name="val5" office:value-type="string" calcext:value-type="string">
            <text:p>no</text:p>
          </table:table-cell>
          <table:table-cell table:style-name="ce36" table:formula="of:=IF([.B16]=&quot;&quot;;&quot;&quot;;ROUND([.C16]*IF([.D16]=&quot;&quot;;[$Assumptions.$B$4];[.D16]);2))" office:value-type="float" office:value="150" calcext:value-type="float">
            <text:p>$150.00</text:p>
          </table:table-cell>
          <table:table-cell table:style-name="ce38" table:formula="of:=IF([.B16]=&quot;&quot;;&quot;&quot;;ROUND([.G16]+([.E16]*(1+[$Assumptions.$B$11]))+IF([.F16]=&quot;yes&quot;;[$Assumptions.$B$7];0);2))" office:value-type="float" office:value="249" calcext:value-type="float">
            <text:p>$249.0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7]=&quot;&quot;;&quot;&quot;;ROUND([.C17]*IF([.D17]=&quot;&quot;;[$Assumptions.$B$4];[.D17]);2))">
            <text:p/>
          </table:table-cell>
          <table:table-cell table:style-name="ce38" table:formula="of:=IF([.B17]=&quot;&quot;;&quot;&quot;;ROUND([.G17]+([.E17]*(1+[$Assumptions.$B$11]))+IF([.F1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4" calcext:value-type="float">
            <text:p>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8]=&quot;&quot;;&quot;&quot;;ROUND([.C18]*IF([.D18]=&quot;&quot;;[$Assumptions.$B$4];[.D18]);2))">
            <text:p/>
          </table:table-cell>
          <table:table-cell table:style-name="ce38" table:formula="of:=IF([.B18]=&quot;&quot;;&quot;&quot;;ROUND([.G18]+([.E18]*(1+[$Assumptions.$B$11]))+IF([.F1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19]=&quot;&quot;;&quot;&quot;;ROUND([.C19]*IF([.D19]=&quot;&quot;;[$Assumptions.$B$4];[.D19]);2))">
            <text:p/>
          </table:table-cell>
          <table:table-cell table:style-name="ce38" table:formula="of:=IF([.B19]=&quot;&quot;;&quot;&quot;;ROUND([.G19]+([.E19]*(1+[$Assumptions.$B$11]))+IF([.F1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0]=&quot;&quot;;&quot;&quot;;ROUND([.C20]*IF([.D20]=&quot;&quot;;[$Assumptions.$B$4];[.D20]);2))">
            <text:p/>
          </table:table-cell>
          <table:table-cell table:style-name="ce38" table:formula="of:=IF([.B20]=&quot;&quot;;&quot;&quot;;ROUND([.G20]+([.E20]*(1+[$Assumptions.$B$11]))+IF([.F20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7" calcext:value-type="float">
            <text:p>7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1]=&quot;&quot;;&quot;&quot;;ROUND([.C21]*IF([.D21]=&quot;&quot;;[$Assumptions.$B$4];[.D21]);2))">
            <text:p/>
          </table:table-cell>
          <table:table-cell table:style-name="ce38" table:formula="of:=IF([.B21]=&quot;&quot;;&quot;&quot;;ROUND([.G21]+([.E21]*(1+[$Assumptions.$B$11]))+IF([.F21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2]=&quot;&quot;;&quot;&quot;;ROUND([.C22]*IF([.D22]=&quot;&quot;;[$Assumptions.$B$4];[.D22]);2))">
            <text:p/>
          </table:table-cell>
          <table:table-cell table:style-name="ce38" table:formula="of:=IF([.B22]=&quot;&quot;;&quot;&quot;;ROUND([.G22]+([.E22]*(1+[$Assumptions.$B$11]))+IF([.F22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3]=&quot;&quot;;&quot;&quot;;ROUND([.C23]*IF([.D23]=&quot;&quot;;[$Assumptions.$B$4];[.D23]);2))">
            <text:p/>
          </table:table-cell>
          <table:table-cell table:style-name="ce38" table:formula="of:=IF([.B23]=&quot;&quot;;&quot;&quot;;ROUND([.G23]+([.E23]*(1+[$Assumptions.$B$11]))+IF([.F23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0" calcext:value-type="float">
            <text:p>10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4]=&quot;&quot;;&quot;&quot;;ROUND([.C24]*IF([.D24]=&quot;&quot;;[$Assumptions.$B$4];[.D24]);2))">
            <text:p/>
          </table:table-cell>
          <table:table-cell table:style-name="ce38" table:formula="of:=IF([.B24]=&quot;&quot;;&quot;&quot;;ROUND([.G24]+([.E24]*(1+[$Assumptions.$B$11]))+IF([.F24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1" calcext:value-type="float">
            <text:p>11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5]=&quot;&quot;;&quot;&quot;;ROUND([.C25]*IF([.D25]=&quot;&quot;;[$Assumptions.$B$4];[.D25]);2))">
            <text:p/>
          </table:table-cell>
          <table:table-cell table:style-name="ce38" table:formula="of:=IF([.B25]=&quot;&quot;;&quot;&quot;;ROUND([.G25]+([.E25]*(1+[$Assumptions.$B$11]))+IF([.F25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2" calcext:value-type="float">
            <text:p>12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6]=&quot;&quot;;&quot;&quot;;ROUND([.C26]*IF([.D26]=&quot;&quot;;[$Assumptions.$B$4];[.D26]);2))">
            <text:p/>
          </table:table-cell>
          <table:table-cell table:style-name="ce38" table:formula="of:=IF([.B26]=&quot;&quot;;&quot;&quot;;ROUND([.G26]+([.E26]*(1+[$Assumptions.$B$11]))+IF([.F26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7]=&quot;&quot;;&quot;&quot;;ROUND([.C27]*IF([.D27]=&quot;&quot;;[$Assumptions.$B$4];[.D27]);2))">
            <text:p/>
          </table:table-cell>
          <table:table-cell table:style-name="ce38" table:formula="of:=IF([.B27]=&quot;&quot;;&quot;&quot;;ROUND([.G27]+([.E27]*(1+[$Assumptions.$B$11]))+IF([.F27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8]=&quot;&quot;;&quot;&quot;;ROUND([.C28]*IF([.D28]=&quot;&quot;;[$Assumptions.$B$4];[.D28]);2))">
            <text:p/>
          </table:table-cell>
          <table:table-cell table:style-name="ce38" table:formula="of:=IF([.B28]=&quot;&quot;;&quot;&quot;;ROUND([.G28]+([.E28]*(1+[$Assumptions.$B$11]))+IF([.F28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31"/>
          <table:table-cell table:style-name="ce33" table:content-validation-name="val4"/>
          <table:table-cell table:style-name="ce34" table:content-validation-name="val4" table:number-columns-repeated="2"/>
          <table:table-cell table:style-name="ce35" table:content-validation-name="val5"/>
          <table:table-cell table:style-name="ce36" table:formula="of:=IF([.B29]=&quot;&quot;;&quot;&quot;;ROUND([.C29]*IF([.D29]=&quot;&quot;;[$Assumptions.$B$4];[.D29]);2))">
            <text:p/>
          </table:table-cell>
          <table:table-cell table:style-name="ce38" table:formula="of:=IF([.B29]=&quot;&quot;;&quot;&quot;;ROUND([.G29]+([.E29]*(1+[$Assumptions.$B$11]))+IF([.F29]=&quot;yes&quot;;[$Assumptions.$B$7];0);2)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5" table:number-rows-repeated="1048546">
          <table:table-cell table:number-columns-repeated="11"/>
          <table:table-cell table:style-name="Default" table:number-columns-repeated="16373"/>
        </table:table-row>
        <table:table-row table:style-name="ro5">
          <table:table-cell table:number-columns-repeated="11"/>
          <table:table-cell table:style-name="Default" table:number-columns-repeated="16373"/>
        </table:table-row>
      </table:table>
      <table:table table:name="Quote Summary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16378"/>
        <table:table-row table:style-name="ro1">
          <table:table-cell table:style-name="ce1" office:value-type="string" calcext:value-type="string" table:number-columns-spanned="6" table:number-rows-spanned="1">
            <text:p>Quote Summary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Use this sheet to decide whether the quote is ready to send.</text:p>
          </table:table-cell>
          <table:covered-table-cell table:number-columns-repeated="5"/>
        </table:table-row>
        <table:table-row table:style-name="ro3" table:number-rows-repeated="5">
          <table:table-cell table:number-columns-repeated="6"/>
        </table:table-row>
        <table:table-row table:style-name="ro6">
          <table:table-cell table:style-name="ce41" office:value-type="string" calcext:value-type="string">
            <text:p>Quote total</text:p>
          </table:table-cell>
          <table:table-cell table:style-name="ce42" table:formula="of:=ROUND(SUM([$'Scope Inputs'.H15:.H29])*(1+IF([$'Scope Inputs'.B9]=&quot;yes&quot;;[$Assumptions.$B$8];0))-[$'Scope Inputs'.B11];2)" office:value-type="float" office:value="585" calcext:value-type="float">
            <text:p>$585.00</text:p>
          </table:table-cell>
          <table:table-cell/>
          <table:table-cell table:style-name="ce7" office:value-type="string" calcext:value-type="string">
            <text:p>What this means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Deposit amount</text:p>
          </table:table-cell>
          <table:table-cell table:style-name="ce42" table:formula="of:=ROUND([.B8]*[$Assumptions.$B$5];2)" office:value-type="float" office:value="292.5" calcext:value-type="float">
            <text:p>$292.50</text:p>
          </table:table-cell>
          <table:table-cell/>
          <table:table-cell table:style-name="ce16" office:value-type="string" calcext:value-type="string" table:number-columns-spanned="3" table:number-rows-spanned="1">
            <text:p>send_ready: scope complete, timeline realistic, quote above floor</text:p>
          </table:table-cell>
          <table:covered-table-cell table:number-columns-repeated="2"/>
        </table:table-row>
        <table:table-row table:style-name="ro6">
          <table:table-cell table:style-name="ce41" office:value-type="string" calcext:value-type="string">
            <text:p>Delivery window</text:p>
          </table:table-cell>
          <table:table-cell table:style-name="ce43" table:formula="of:=IF([$'Scope Inputs'.B9]=&quot;yes&quot;;TEXT([$Assumptions.$B$10];&quot;0&quot;)&amp;&quot; business days&quot;;TEXT([$Assumptions.$B$9];&quot;0&quot;)&amp;&quot; business days&quot;)" office:value-type="string" office:string-value="5 business days" calcext:value-type="string">
            <text:p>5 business days</text:p>
          </table:table-cell>
          <table:table-cell/>
          <table:table-cell table:style-name="ce16" office:value-type="string" calcext:value-type="string" table:number-columns-spanned="3" table:number-rows-spanned="1">
            <text:p>clarify_scope: missing readiness input or no valid scope rows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below_floor: total exists but job is too small at the current scope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Quote confidence state</text:p>
          </table:table-cell>
          <table:table-cell table:style-name="ce43" table:formula="of:=IF(OR([$'Scope Inputs'.B4]=&quot;&quot;;[$'Scope Inputs'.B5]=&quot;&quot;;[$'Scope Inputs'.B6]&lt;&gt;&quot;yes&quot;;[$'Scope Inputs'.B7]&lt;&gt;&quot;yes&quot;;[$'Scope Inputs'.B8]&lt;&gt;&quot;yes&quot;;COUNTIF([$'Scope Inputs'.B15:.B29];&quot;&lt;&gt;&quot;)=0);&quot;clarify_scope&quot;;IF(AND([$'Scope Inputs'.B9]=&quot;yes&quot;;[$'Scope Inputs'.B10]&lt;[$Assumptions.$B$10]);&quot;unrealistic_timeline&quot;;IF([.B8]&lt;[$Assumptions.$B$6];&quot;below_floor&quot;;&quot;send_ready&quot;)))" office:value-type="string" office:string-value="send_ready" calcext:value-type="string">
            <text:p>send_ready</text:p>
          </table:table-cell>
          <table:table-cell/>
          <table:table-cell table:style-name="ce16" office:value-type="string" calcext:value-type="string" table:number-columns-spanned="3" table:number-rows-spanned="1">
            <text:p>unrealistic_timeline: quote is feasible only if the delivery expectation changes</text:p>
          </table:table-cell>
          <table:covered-table-cell table:number-columns-repeated="2"/>
        </table:table-row>
        <table:table-row table:style-name="ro7">
          <table:table-cell table:style-name="ce41" office:value-type="string" calcext:value-type="string">
            <text:p>Recommended next step</text:p>
          </table:table-cell>
          <table:table-cell table:style-name="ce44" table:formula="of:=IF([.B12]=&quot;clarify_scope&quot;;&quot;Ask for missing scope details before sending the quote&quot;;IF([.B12]=&quot;unrealistic_timeline&quot;;&quot;Reset delivery expectation before sending&quot;;IF([.B12]=&quot;below_floor&quot;;&quot;Raise scope, remove discount, or decline the job&quot;;&quot;Send the quote with deposit and timeline&quot;)))" office:value-type="string" office:string-value="Send the quote with deposit and timeline" calcext:value-type="string">
            <text:p>Send the quote with deposit and timeline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6">
          <table:table-cell table:style-name="ce41" office:value-type="string" calcext:value-type="string">
            <text:p>Minimum profitable floor</text:p>
          </table:table-cell>
          <table:table-cell table:style-name="ce42" table:formula="of:=[$Assumptions.$B$6]" office:value-type="float" office:value="250" calcext:value-type="float">
            <text:p>$250.00</text:p>
          </table:table-cell>
          <table:table-cell/>
          <table:table-cell table:style-name="ce7" office:value-type="string" calcext:value-type="string">
            <text:p>Proof checklist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Quote margin buffer</text:p>
          </table:table-cell>
          <table:table-cell table:style-name="ce42" table:formula="of:=ROUND([.B8]-[.B15];2)" office:value-type="float" office:value="335" calcext:value-type="float">
            <text:p>$335.00</text:p>
          </table:table-cell>
          <table:table-cell/>
          <table:table-cell table:style-name="ce16" office:value-type="string" calcext:value-type="string" table:number-columns-spanned="3" table:number-rows-spanned="1">
            <text:p>• Totals respond to Assumptions and Scope Inputs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You should not send when the state is clarify_scope, below_floor, or unrealistic_timeline.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• Deposit and timeline update automatically from the current quote.</text:p>
          </table:table-cell>
          <table:covered-table-cell table:number-columns-repeated="2"/>
        </table:table-row>
        <table:table-row table:style-name="ro5" table:number-rows-repeated="104855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aved Quotes" table:style-name="ta5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8" table:default-cell-style-name="ce3"/>
        <table:table-column table:style-name="co10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1" table:default-cell-style-name="ce3"/>
        <table:table-column table:style-name="co8" table:default-cell-style-name="ce3"/>
        <table:table-column table:style-name="co4" table:number-columns-repeated="16374"/>
        <table:table-row table:style-name="ro1">
          <table:table-cell table:style-name="ce1" office:value-type="string" calcext:value-type="string" table:number-columns-spanned="10" table:number-rows-spanned="1">
            <text:p>Saved Quotes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 table:number-columns-spanned="10" table:number-rows-spanned="1">
            <text:p>Use this log to keep prior quote snapshots visible without overwriting them.</text:p>
          </table:table-cell>
          <table:covered-table-cell table:number-columns-repeated="9"/>
        </table:table-row>
        <table:table-row table:style-name="ro3">
          <table:table-cell table:number-columns-repeated="10"/>
        </table:table-row>
        <table:table-row table:style-name="ro8">
          <table:table-cell table:style-name="ce27" office:value-type="string" calcext:value-type="string">
            <text:p>Quote date</text:p>
          </table:table-cell>
          <table:table-cell table:style-name="ce30" office:value-type="string" calcext:value-type="string">
            <text:p>Client</text:p>
          </table:table-cell>
          <table:table-cell table:style-name="ce30" office:value-type="string" calcext:value-type="string">
            <text:p>Job type</text:p>
          </table:table-cell>
          <table:table-cell table:style-name="ce30" office:value-type="string" calcext:value-type="string">
            <text:p>Quote total</text:p>
          </table:table-cell>
          <table:table-cell table:style-name="ce30" office:value-type="string" calcext:value-type="string">
            <text:p>Deposit</text:p>
          </table:table-cell>
          <table:table-cell table:style-name="ce30" office:value-type="string" calcext:value-type="string">
            <text:p>Delivery window</text:p>
          </table:table-cell>
          <table:table-cell table:style-name="ce30" office:value-type="string" calcext:value-type="string">
            <text:p>State</text:p>
          </table:table-cell>
          <table:table-cell table:style-name="ce30" office:value-type="string" calcext:value-type="string">
            <text:p>Next step</text:p>
          </table:table-cell>
          <table:table-cell table:style-name="ce30" office:value-type="string" calcext:value-type="string">
            <text:p>Notes</text:p>
          </table:table-cell>
          <table:table-cell table:style-name="ce37" office:value-type="string" calcext:value-type="string">
            <text:p>Version</text:p>
          </table:table-cell>
        </table:table-row>
        <table:table-row table:style-name="ro1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Jordan Lee</text:p>
          </table:table-cell>
          <table:table-cell table:style-name="ce31" office:value-type="string" calcext:value-type="string">
            <text:p>repair_bundle</text:p>
          </table:table-cell>
          <table:table-cell table:style-name="ce34" office:value-type="float" office:value="585" calcext:value-type="float">
            <text:p>$585.00</text:p>
          </table:table-cell>
          <table:table-cell table:style-name="ce34" office:value-type="float" office:value="175.5" calcext:value-type="float">
            <text:p>$175.50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send_ready</text:p>
          </table:table-cell>
          <table:table-cell table:style-name="ce46" office:value-type="string" calcext:value-type="string">
            <text:p>Send the quote with deposit and timeline</text:p>
          </table:table-cell>
          <table:table-cell table:style-name="ce46" office:value-type="string" calcext:value-type="string">
            <text:p>Seeded standard quo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9">
          <table:table-cell table:style-name="ce45" office:value-type="string" calcext:value-type="string">
            <text:p>2026-06-30</text:p>
          </table:table-cell>
          <table:table-cell table:style-name="ce31" office:value-type="string" calcext:value-type="string">
            <text:p>Partial example</text:p>
          </table:table-cell>
          <table:table-cell table:style-name="ce31" office:value-type="string" calcext:value-type="string">
            <text:p>drywall_patch</text:p>
          </table:table-cell>
          <table:table-cell table:style-name="ce34" office:value-type="float" office:value="188.5" calcext:value-type="float">
            <text:p>$188.50</text:p>
          </table:table-cell>
          <table:table-cell table:style-name="ce34" office:value-type="float" office:value="56.55" calcext:value-type="float">
            <text:p>$56.55</text:p>
          </table:table-cell>
          <table:table-cell table:style-name="ce35" office:value-type="string" calcext:value-type="string">
            <text:p>5 business days</text:p>
          </table:table-cell>
          <table:table-cell table:style-name="ce31" office:value-type="string" calcext:value-type="string">
            <text:p>clarify_scope</text:p>
          </table:table-cell>
          <table:table-cell table:style-name="ce46" office:value-type="string" calcext:value-type="string">
            <text:p>Ask for missing scope details before sending the quote</text:p>
          </table:table-cell>
          <table:table-cell table:style-name="ce46" office:value-type="string" calcext:value-type="string">
            <text:p>Shows blocked send state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8" table:number-rows-repeated="48">
          <table:table-cell table:style-name="ce45"/>
          <table:table-cell table:style-name="ce31" table:number-columns-repeated="2"/>
          <table:table-cell table:style-name="ce34" table:number-columns-repeated="2"/>
          <table:table-cell table:style-name="ce35"/>
          <table:table-cell table:style-name="ce31"/>
          <table:table-cell table:style-name="ce46" table:number-columns-repeated="2"/>
          <table:table-cell table:style-name="ce47"/>
        </table:table-row>
        <table:table-row table:style-name="ro5" table:number-rows-repeated="1048521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ssumptions" style:display-name="PageStyle_Assump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ote_20_Summary" style:display-name="PageStyle_Quote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pe_20_Inputs" style:display-name="PageStyle_Scope Inpu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rt_20_Here" style:display-name="PageStyle_Start He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ved_20_Quotes" style:display-name="PageStyle_Saved Qu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dc:language>en-US</dc:language>
    <meta:creation-date>2026-06-30T07:36:12</meta:creation-date>
    <dc:date>2026-06-30T07:39:13</dc:date>
    <meta:editing-cycles>0</meta:editing-cycles>
    <meta:generator>LibreOffice/26.2.4.2$MacOSX_AARCH64 LibreOffice_project/0229ac93fcf0d7cbc6376066c6f35021cef002dc</meta:generator>
    <meta:document-statistic meta:table-count="5" meta:cell-count="196" meta:object-count="0"/>
    <meta:user-defined meta:name="AppVersion">3.1</meta:user-defined>
  </office:meta>
</office:document-meta>
</file>